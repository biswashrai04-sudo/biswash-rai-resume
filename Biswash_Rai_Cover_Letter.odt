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.0138in" style:contextual-spacing="false"/>
    </style:style>
    <style:style style:name="P2" style:family="paragraph" style:parent-style-name="Standard">
      <style:paragraph-properties fo:margin-top="0in" fo:margin-bottom="0.139in" style:contextual-spacing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444444" loext:opacity="100%" fo:font-size="9pt" style:font-size-asian="9pt" style:font-size-complex="9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swash Rai</text:span></text:p>
      <text:p text:style-name="P2"><text:span text:style-name="T2">Abu Dhabi, UAE <text:s/>| <text:s/>0565815687 <text:s/>| <text:s/>biswashrai04@gmail.com</text:span></text:p>
      <text:p text:style-name="P2"/>
      <text:p text:style-name="P2"><text:span text:style-name="T3">Hiring Team</text:span></text:p>
      <text:p text:style-name="P2"><text:span text:style-name="T4">Humaid Alqubaisi Gen. Cont. and Maint. Est.</text:span></text:p>
      <text:p text:style-name="P2"><text:span text:style-name="T4">Abu Dhabi, UAE</text:span></text:p>
      <text:p text:style-name="P2"/>
      <text:p text:style-name="P2"><text:span text:style-name="T3">Re: Application for Administrative Assistant</text:span></text:p>
      <text:p text:style-name="P2"><text:span text:style-name="T4">Dear Hiring Manager,</text:span></text:p>
      <text:p text:style-name="P2"><text:span text:style-name="T4">I am writing to apply for the Administrative Assistant position at Humaid Alqubaisi Gen. Cont. and Maint. Est. With a Bachelor's degree in Business Management and over two years of hands-on experience in document control, correspondence management, and records coordination, I am confident I can support your team's daily operations with accuracy and reliability, and I am available to join immediately.</text:span></text:p>
      <text:p text:style-name="P2"><text:span text:style-name="T4">In my current role as an Administrative Operations &amp; Digital Specialist, I manage structured filing systems for contracts and correspondence, maintain calendars and scheduling for leadership, and handle invoice logging and vendor documentation while ensuring strict confidentiality — responsibilities that map closely to the document control, LPO preparation, and supplier coordination this role requires. I am also comfortable managing high volumes of correspondence and calls, preparing internal memos, and keeping multiple project files organized simultaneously, all skills I have built and refined over the past two years.</text:span></text:p>
      <text:p text:style-name="P2"><text:span text:style-name="T4">I am proficient across MS Office (Word, Excel, PowerPoint, Outlook) and Google Workspace, and I bring a strong, self-taught habit of building clean tracking and archiving systems — something I know is critical for managing technical submittals, drawings, and contract documents in a contracting environment. While my recent experience has been outside the construction sector specifically, I am a fast learner who picks up company and project documentation standards quickly, and I am genuinely excited to bring my organizational skills into a construction and contracting setting.</text:span></text:p>
      <text:p text:style-name="P2"><text:span text:style-name="T4">I would welcome the chance to discuss how I can support your office operations. Thank you for considering my application — I look forward to hearing from you.</text:span></text:p>
      <text:p text:style-name="P2"><text:span text:style-name="T4">Sincerely,</text:span></text:p>
      <text:p text:style-name="P2"><text:span text:style-name="T4">Biswash Ra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SimSun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SimSun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945in" fo:margin-bottom="0.6945in" fo:margin-left="0.7638in" fo:margin-right="0.763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7-07T21:14:54.715000000</meta:creation-date>
    <dc:date>2026-07-07T21:14:54.715000000</dc:date>
    <meta:generator>LibreOffice/26.2.4.2$Windows_X86_64 LibreOffice_project/0229ac93fcf0d7cbc6376066c6f35021cef002dc</meta:generator>
    <meta:document-statistic meta:table-count="0" meta:image-count="0" meta:object-count="0" meta:page-count="1" meta:paragraph-count="13" meta:word-count="291" meta:character-count="1988" meta:non-whitespace-character-count="1703"/>
  </office:meta>
</office:document-meta>
</file>