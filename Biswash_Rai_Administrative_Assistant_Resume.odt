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111in" style:contextual-spacing="false" fo:padding="0in" fo:border-left="none" fo:border-right="none" fo:border-top="none" fo:border-bottom="0.74pt solid #444444"/>
    </style:style>
    <style:style style:name="P4" style:family="paragraph" style:parent-style-name="Standard">
      <style:paragraph-properties fo:margin-top="0.1665in" fo:margin-bottom="0.0693in" style:contextual-spacing="false"/>
    </style:style>
    <style:style style:name="P5" style:family="paragraph" style:parent-style-name="Standard">
      <style:paragraph-properties fo:margin-top="0in" fo:margin-bottom="0.0555in" style:contextual-spacing="false"/>
    </style:style>
    <style:style style:name="P6" style:family="paragraph" style:parent-style-name="List_20_Paragraph" style:list-style-name="WWNum1">
      <style:paragraph-properties fo:margin-top="0in" fo:margin-bottom="0.0417in" style:contextual-spacing="false"/>
    </style:style>
    <style:style style:name="P7" style:family="paragraph" style:parent-style-name="Standard">
      <style:paragraph-properties fo:margin-top="0in" fo:margin-bottom="0.0138in" style:contextual-spacing="false"/>
    </style:style>
    <style:style style:name="P8" style:family="paragraph" style:parent-style-name="Standard">
      <style:paragraph-properties fo:margin-top="0.111in" fo:margin-bottom="0.0138in" style:contextual-spacing="false"/>
    </style:style>
    <style:style style:name="T1" style:family="text">
      <style:text-properties fo:color="#1f3864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444444" loext:opacity="100%" fo:font-size="9pt" style:font-size-asian="9pt" style:font-size-complex="9pt"/>
    </style:style>
    <style:style style:name="T3" style:family="text">
      <style:text-properties fo:color="#1f3864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555555" loext:opacity="100%" fo:font-size="9pt" fo:font-style="italic" style:font-size-asian="9pt" style:font-style-asian="italic" style:font-size-complex="9pt" style:font-style-complex="italic"/>
    </style:style>
    <style:style style:name="T7" style:family="text">
      <style:text-properties fo:color="#444444" loext:opacity="100%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SWASH RAI</text:span></text:p>
      <text:p text:style-name="P2"><text:span text:style-name="T2">Abu Dhabi, UAE <text:s/>| <text:s/>0565815687 <text:s/>| <text:s/>biswashrai04@gmail.com <text:s/>| <text:s/>github.com/biswas04-sudo</text:span></text:p>
      <text:p text:style-name="P3"/>
      <text:p text:style-name="P4"><text:span text:style-name="T3">PROFESSIONAL SUMMARY</text:span></text:p>
      <text:p text:style-name="P5"><text:span text:style-name="T4">Detail-oriented Administrative Assistant with a Bachelor's in Business Management and 2+ years' hands-on experience in document management, correspondence handling, records control, and vendor/invoice coordination. Skilled at building structured filing and tracking systems, managing confidential business documentation, and keeping communication flowing smoothly across departments. Proficient in MS Office and Google Workspace, with a strong foundation in organizing high-volume project and administrative files accurately and on schedule.</text:span></text:p>
      <text:p text:style-name="P4"><text:span text:style-name="T3">CORE SKILLS</text:span></text:p>
      <text:list text:style-name="WWNum1">
        <text:list-item text:start-value="1">
          <text:p text:style-name="P6">Document Control &amp; Filing: Document formatting, numbering &amp; version control, correspondence tracking, digital &amp; physical filing systems, secure/confidential records handling</text:p>
        </text:list-item>
        <text:list-item>
          <text:p text:style-name="P6">Procurement &amp; Vendor Support: Invoice logging, expense &amp; transaction tracking, supplier/vendor coordination, purchase &amp; billing documentation</text:p>
        </text:list-item>
        <text:list-item>
          <text:p text:style-name="P6">Coordination &amp; Scheduling: Calendar management, meeting logistics, appointment coordination, cross-department communication</text:p>
        </text:list-item>
        <text:list-item>
          <text:p text:style-name="P6">Software &amp; Tools: Microsoft Word, Excel, Outlook, PowerPoint; Google Workspace (Sheets, Docs, Drive, Calendar); cloud document systems (Drive/Dropbox); CRM data entry</text:p>
        </text:list-item>
        <text:list-item>
          <text:p text:style-name="P6">Communication: Professional email correspondence, call handling &amp; routing, internal memo preparation, report writing</text:p>
        </text:list-item>
      </text:list>
      <text:p text:style-name="P4"><text:span text:style-name="T3">PROFESSIONAL EXPERIENCE</text:span></text:p>
      <text:p text:style-name="P7"><text:span text:style-name="T5">Administrative Operations &amp; Digital Specialist</text:span><text:span text:style-name="T4"> <text:s/>| <text:s/>Hair by Pannu</text:span></text:p>
      <text:p text:style-name="P5"><text:span text:style-name="T6">Abu Dhabi, UAE <text:s/>| <text:s/>2024 – Present</text:span></text:p>
      <text:list text:continue-numbering="true" text:style-name="WWNum1">
        <text:list-item>
          <text:p text:style-name="P6">Built and maintained structured records in Google Sheets and Excel to log transactions, track client interactions, and archive contract and correspondence documentation accurately.</text:p>
        </text:list-item>
        <text:list-item>
          <text:p text:style-name="P6">Managed calendar and scheduling systems, coordinating appointments and ensuring conflict-free booking for leadership.</text:p>
        </text:list-item>
        <text:list-item>
          <text:p text:style-name="P6">Monitored and responded to incoming correspondence, drafted professional emails, and set up automated confirmation replies to improve response times.</text:p>
        </text:list-item>
        <text:list-item>
          <text:p text:style-name="P6">Compiled expense and invoice records, organized supplier/vendor documentation, and maintained strict confidentiality on all operational files.</text:p>
        </text:list-item>
      </text:list>
      <text:p text:style-name="P8"><text:span text:style-name="T5">Independent Administrative Consultant</text:span><text:span text:style-name="T4"> <text:s/>| <text:s/>Freelancer.com</text:span></text:p>
      <text:p text:style-name="P5"><text:span text:style-name="T6">Remote <text:s/>| <text:s/>2024 – Present</text:span></text:p>
      <text:list text:continue-numbering="true" text:style-name="WWNum1">
        <text:list-item>
          <text:p text:style-name="P6">Designed multi-step document and correspondence workflows connecting email, tracking sheets, and internal filing systems for accurate, lag-free record-keeping.</text:p>
        </text:list-item>
        <text:list-item>
          <text:p text:style-name="P6">Created standardized layouts, process templates, and documentation guidelines to help clients streamline their administrative operations.</text:p>
        </text:list-item>
      </text:list>
      <text:p text:style-name="P4"><text:span text:style-name="T3">EDUCATION</text:span></text:p>
      <text:p text:style-name="P5"><text:span text:style-name="T5">Bachelor of Business Management (BBM) — Himalayan White House International College</text:span></text:p>
      <text:p text:style-name="P5"><text:span text:style-name="T7">Focus: Business Administration, Corporate Communications, Strategic Operations, Spreadsheet Model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SimSun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SimSun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252in" fo:margin-right="0.625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7-07T21:14:39.985000000</meta:creation-date>
    <dc:date>2026-07-07T21:14:39.985000000</dc:date>
    <meta:document-statistic meta:table-count="0" meta:image-count="0" meta:object-count="0" meta:page-count="1" meta:paragraph-count="24" meta:word-count="322" meta:character-count="2675" meta:non-whitespace-character-count="2371"/>
    <meta:generator>LibreOffice/26.2.4.2$Windows_X86_64 LibreOffice_project/0229ac93fcf0d7cbc6376066c6f35021cef002dc</meta:generator>
  </office:meta>
</office:document-meta>
</file>